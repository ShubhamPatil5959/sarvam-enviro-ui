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20pt" style:font-size-asian="20pt" style:font-size-complex="20pt"/>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list-style-name="LFO1" style:family="paragraph"/>
    <style:style style:name="T6" style:parent-style-name="DefaultParagraphFont" style:family="text">
      <style:text-properties fo:font-weight="bold" style:font-weight-asian="bold" style:font-weight-complex="bold"/>
    </style:style>
    <style:style style:name="P7" style:parent-style-name="Normal" style:list-style-name="LFO1" style:family="paragraph"/>
    <style:style style:name="T8" style:parent-style-name="DefaultParagraphFont" style:family="text">
      <style:text-properties fo:font-weight="bold" style:font-weight-asian="bold" style:font-weight-complex="bold"/>
    </style:style>
    <style:style style:name="P9" style:parent-style-name="Normal" style:list-style-name="LFO1" style:family="paragraph"/>
    <style:style style:name="T10" style:parent-style-name="DefaultParagraphFont" style:family="text">
      <style:text-properties fo:font-weight="bold" style:font-weight-asian="bold" style:font-weight-complex="bold"/>
    </style:style>
    <style:style style:name="P11" style:parent-style-name="Normal" style:list-style-name="LFO1" style:family="paragraph"/>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style:font-name="Segoe UI Emoji" style:font-name-complex="Segoe UI Emoji"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list-style-name="LFO3" style:family="paragraph"/>
    <style:style style:name="T18" style:parent-style-name="DefaultParagraphFont" style:family="text">
      <style:text-properties fo:font-weight="bold" style:font-weight-asian="bold" style:font-weight-complex="bold"/>
    </style:style>
    <style:style style:name="P19" style:parent-style-name="Normal" style:list-style-name="LFO3" style:family="paragraph"/>
    <style:style style:name="T20" style:parent-style-name="DefaultParagraphFont" style:family="text">
      <style:text-properties fo:font-weight="bold" style:font-weight-asian="bold" style:font-weight-complex="bold"/>
    </style:style>
    <style:style style:name="P21" style:parent-style-name="Normal" style:list-style-name="LFO3" style:family="paragraph"/>
    <style:style style:name="T22" style:parent-style-name="DefaultParagraphFont" style:family="text">
      <style:text-properties fo:font-weight="bold" style:font-weight-asian="bold" style:font-weight-complex="bold"/>
    </style:style>
    <style:style style:name="P23" style:parent-style-name="Normal" style:list-style-name="LFO3" style:family="paragraph"/>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style:font-name="Segoe UI Emoji" style:font-name-complex="Segoe UI Emoji"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name="P31" style:parent-style-name="Normal" style:list-style-name="LFO5" style:family="paragraph"/>
    <style:style style:name="T32" style:parent-style-name="DefaultParagraphFont" style:family="text">
      <style:text-properties fo:font-weight="bold" style:font-weight-asian="bold" style:font-weight-complex="bold"/>
    </style:style>
    <style:style style:name="P33" style:parent-style-name="Normal" style:list-style-name="LFO5" style:family="paragraph"/>
    <style:style style:name="T34" style:parent-style-name="DefaultParagraphFont" style:family="text">
      <style:text-properties fo:font-weight="bold" style:font-weight-asian="bold" style:font-weight-complex="bold"/>
    </style:style>
    <style:style style:name="P35" style:parent-style-name="Normal" style:list-style-name="LFO5" style:family="paragraph"/>
    <style:style style:name="T36" style:parent-style-name="DefaultParagraphFont" style:family="text">
      <style:text-properties fo:font-weight="bold" style:font-weight-asian="bold" style:font-weight-complex="bold"/>
    </style:style>
    <style:style style:name="P37" style:parent-style-name="Normal" style:list-style-name="LFO6" style:family="paragraph"/>
    <style:style style:name="T38" style:parent-style-name="DefaultParagraphFont" style:family="text">
      <style:text-properties style:font-name="Segoe UI Emoji" style:font-name-complex="Segoe UI Emoji"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list-style-name="LFO7" style:family="paragraph"/>
    <style:style style:name="T45" style:parent-style-name="DefaultParagraphFont" style:family="text">
      <style:text-properties fo:font-weight="bold" style:font-weight-asian="bold" style:font-weight-complex="bold"/>
    </style:style>
    <style:style style:name="P46" style:parent-style-name="Normal" style:list-style-name="LFO7" style:family="paragraph"/>
    <style:style style:name="T47" style:parent-style-name="DefaultParagraphFont" style:family="text">
      <style:text-properties fo:font-weight="bold" style:font-weight-asian="bold" style:font-weight-complex="bold"/>
    </style:style>
    <style:style style:name="P48" style:parent-style-name="Normal" style:list-style-name="LFO7" style:family="paragraph"/>
    <style:style style:name="T49" style:parent-style-name="DefaultParagraphFont" style:family="text">
      <style:text-properties fo:font-weight="bold" style:font-weight-asian="bold" style:font-weight-complex="bold"/>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Turn Sustainability into Revenue</text:p>
      <text:p text:style-name="P2">A. Carbon Project Development</text:p>
      <text:p text:style-name="P3">Build High-Integrity Carbon Assets from the Ground Up</text:p>
      <text:p text:style-name="Normal">We design, develop, and implement high-integrity carbon credit projects across nature-based and technology-driven solutions. Our approach combines scientific methodologies, strong on-ground execution, and community engagement to create projects that deliver measurable environmental impact and long-term financial value.</text:p>
      <text:p text:style-name="Normal">From concept to implementation, we ensure your project is structured to meet global standards and generate verified carbon credits.</text:p>
      <text:p text:style-name="P4">Our Capabilities</text:p>
      <text:list text:style-name="LFO1" text:continue-numbering="true">
        <text:list-item>
          <text:p text:style-name="P5"><text:span text:style-name="T6">Feasibility Studies &amp; Baseline Assessment</text:span><text:line-break/>Evaluate project viability, carbon potential, and financial returns before execution.<text:s/></text:p>
        </text:list-item>
        <text:list-item>
          <text:p text:style-name="P7"><text:span text:style-name="T8">Project Design &amp; Methodology Selection</text:span><text:line-break/>Development of projects across afforestation, regenerative agriculture, biochar, and waste-to-energy aligned with recognized standards (e.g., Verra, Gold Standard).<text:s/></text:p>
        </text:list-item>
        <text:list-item>
          <text:p text:style-name="P9"><text:span text:style-name="T10">Regulatory Approvals &amp; Government Liaisoning</text:span><text:line-break/>End-to-end support for approvals including Letters of Authorization (LOA), NOCs, and coordination with relevant authorities.<text:s/></text:p>
        </text:list-item>
        <text:list-item>
          <text:p text:style-name="P11"><text:span text:style-name="T12">Community Engagement &amp; Implementation</text:span><text:line-break/>Strong partnerships with farmers, FPOs, NGOs, and local stakeholders to ensure scalable and sustainable project execution.<text:s/></text:p>
        </text:list-item>
      </text:list>
      <text:p text:style-name="Normal"><draw:custom-shape svg:x="0in" svg:y="0in" svg:width="45.51042in" svg:height="0.00139in" draw:z-index="0" draw:id="id0" draw:style-name="a0" draw:name="Horizontal Line 19" text:anchor-type="as-char"><svg:title/><svg:desc/><draw:enhanced-geometry draw:type="non-primitive" svg:viewBox="0 0 21600 21600" draw:enhanced-path="M 0 0 L 21600 0 21600 21600 0 21600 Z N"/></draw:custom-shape></text:p>
      <text:p text:style-name="Normal"><text:span text:style-name="T13">📊</text:span><text:span text:style-name="T14"><text:s/>B. Carbon Credit Management &amp; Monetization</text:span></text:p>
      <text:p text:style-name="P15">Convert Carbon Projects into Revenue Streams</text:p>
      <text:p text:style-name="Normal">We provide end-to-end carbon credit lifecycle management, enabling organizations to transform sustainability initiatives into tradable financial assets. Our expertise ensures your project meets international standards, achieves certification efficiently, and connects with the right buyers in global markets.</text:p>
      <text:p text:style-name="P16">Our Capabilities</text:p>
      <text:soft-page-break/>
      <text:list text:style-name="LFO3" text:continue-numbering="true">
        <text:list-item>
          <text:p text:style-name="P17"><text:span text:style-name="T18">Monitoring, Reporting &amp; Verification (MRV)</text:span><text:line-break/>Robust systems for tracking emissions reduction, data management, and transparent reporting.<text:s/></text:p>
        </text:list-item>
        <text:list-item>
          <text:p text:style-name="P19"><text:span text:style-name="T20">Certification &amp; Issuance</text:span><text:line-break/>End-to-end coordination with global standards such as Verra and Gold Standard to validate and issue carbon credits.<text:s/></text:p>
        </text:list-item>
        <text:list-item>
          <text:p text:style-name="P21"><text:span text:style-name="T22">Carbon Credit Trading &amp; Sales Strategy</text:span><text:line-break/>Strategic positioning, pricing, and sale of carbon credits in voluntary and compliance markets.<text:s/></text:p>
        </text:list-item>
        <text:list-item>
          <text:p text:style-name="P23"><text:span text:style-name="T24">Global Buyer Access</text:span><text:line-break/>Established network of buyers across Europe, Japan, and other international markets.<text:s/></text:p>
        </text:list-item>
      </text:list>
      <text:p text:style-name="Normal"><draw:custom-shape svg:x="0in" svg:y="0in" svg:width="45.51042in" svg:height="0.00139in" draw:z-index="0" draw:id="id1" draw:style-name="a1" draw:name="Horizontal Line 20" text:anchor-type="as-char"><svg:title/><svg:desc/><draw:enhanced-geometry draw:type="non-primitive" svg:viewBox="0 0 21600 21600" draw:enhanced-path="M 0 0 L 21600 0 21600 21600 0 21600 Z N"/></draw:custom-shape></text:p>
      <text:p text:style-name="Normal"><text:span text:style-name="T25">♻️</text:span><text:span text:style-name="T26"><text:s/></text:span><text:span text:style-name="T27">C</text:span><text:span text:style-name="T28">. Circular Economy &amp; Environmental Compliance</text:span></text:p>
      <text:p text:style-name="P29">Turn Compliance Requirements into Business Opportunities</text:p>
      <text:p text:style-name="Normal">We help organizations navigate complex environmental regulations while unlocking value through circular economy solutions. Our approach integrates compliance with revenue-generating mechanisms, enabling businesses to reduce waste, improve sustainability performance, and create new value streams.</text:p>
      <text:p text:style-name="P30">Our Capabilities</text:p>
      <text:list text:style-name="LFO5" text:continue-numbering="true">
        <text:list-item>
          <text:p text:style-name="P31"><text:span text:style-name="T32">Plastic Credit Solutions</text:span><text:line-break/>Design and implementation of projects that generate verified plastic credits aligned with global standards.<text:s/></text:p>
        </text:list-item>
        <text:list-item>
          <text:p text:style-name="P33"><text:span text:style-name="T34">Extended Producer Responsibility (EPR) Advisory &amp; Trading</text:span><text:line-break/>End-to-end support for EPR compliance, including strategy, documentation, and credit trading.<text:s/></text:p>
        </text:list-item>
        <text:list-item>
          <text:p text:style-name="P35"><text:span text:style-name="T36">Waste-to-Energy Project Support</text:span><text:line-break/>Conversion of waste streams into energy and carbon credit opportunities through structured project development.<text:s/></text:p>
        </text:list-item>
      </text:list>
      <text:list text:style-name="LFO6" text:continue-numbering="true">
        <text:list-item>
          <text:p text:style-name="P37">Improved sustainability positioning and brand value<text:s/></text:p>
        </text:list-item>
      </text:list>
      <text:p text:style-name="Normal"><draw:custom-shape svg:x="0in" svg:y="0in" svg:width="45.51042in" svg:height="0.00139in" draw:z-index="0" draw:id="id2" draw:style-name="a2" draw:name="Horizontal Line 21" text:anchor-type="as-char"><svg:title/><svg:desc/><draw:enhanced-geometry draw:type="non-primitive" svg:viewBox="0 0 21600 21600" draw:enhanced-path="M 0 0 L 21600 0 21600 21600 0 21600 Z N"/></draw:custom-shape></text:p>
      <text:p text:style-name="Normal"><text:span text:style-name="T38">⚡</text:span><text:span text:style-name="T39"><text:s/></text:span><text:span text:style-name="T40">D</text:span><text:span text:style-name="T41">. Renewable Energy Certificate (IREC) Services</text:span></text:p>
      <text:p text:style-name="P42">Monetize Your Renewable Energy Potential</text:p>
      <text:soft-page-break/>
      <text:p text:style-name="Normal">We support renewable energy producers and organizations in registering and trading International Renewable Energy Certificates (IRECs), enabling them to unlock additional revenue while contributing to global clean energy goals.</text:p>
      <text:p text:style-name="P43">Our Capabilities</text:p>
      <text:list text:style-name="LFO7" text:continue-numbering="true">
        <text:list-item>
          <text:p text:style-name="P44"><text:span text:style-name="T45">IREC Registration &amp; Documentation</text:span><text:line-break/>Complete support for registering renewable energy assets under IREC frameworks.<text:s/></text:p>
        </text:list-item>
        <text:list-item>
          <text:p text:style-name="P46"><text:span text:style-name="T47">Compliance &amp; Verification Support</text:span><text:line-break/>Ensuring alignment with international standards and smooth certification processes.<text:s/></text:p>
        </text:list-item>
        <text:list-item>
          <text:p text:style-name="P48"><text:span text:style-name="T49">IREC Trading &amp; Monetization</text:span><text:line-break/>Access to buyers and markets for effective trading of renewable energy certificates.<tex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am</meta:initial-creator>
    <dc:creator>Ram</dc:creator>
    <meta:creation-date>2026-05-05T13:31:00Z</meta:creation-date>
    <dc:date>2026-05-05T13:31:00Z</dc:date>
    <meta:template xlink:href="Normal" xlink:type="simple"/>
    <meta:editing-cycles>2</meta:editing-cycles>
    <meta:editing-duration>PT3240S</meta:editing-duration>
    <meta:document-statistic meta:page-count="3" meta:paragraph-count="7" meta:word-count="565" meta:character-count="3781" meta:row-count="26" meta:non-whitespace-character-count="3223"/>
  </office:meta>
</office:document-meta>
</file>